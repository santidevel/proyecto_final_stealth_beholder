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7000002A1EF2957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683" officeooo:paragraph-rsid="000f3683"/>
    </style:style>
    <style:style style:name="P2" style:family="paragraph" style:parent-style-name="Standard">
      <style:text-properties officeooo:rsid="000f8df4" officeooo:paragraph-rsid="000f8d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etiquetado</text:p>
      <text:p text:style-name="P1"><draw:frame draw:style-name="fr1" draw:name="Imagen1" text:anchor-type="char" svg:x="0.079cm" svg:y="0.15cm" svg:width="7.989cm" svg:height="11.04cm" draw:z-index="0"><draw:image xlink:href="Pictures/10000001000001E7000002A1EF2957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stalaciones (requiriments.txt)<text:line-break/># --- CEREBRO VISUAL Y OCR (Script de Datos) ---</text:p>
      <text:p text:style-name="P2">torch</text:p>
      <text:p text:style-name="P2">transformers</text:p>
      <text:p text:style-name="P2">easyocr</text:p>
      <text:p text:style-name="P2">Pillow</text:p>
      <text:p text:style-name="P2"/>
      <text:p text:style-name="P2"># --- VISIÓN ARTIFICIAL BASE ---</text:p>
      <text:p text:style-name="P2"># Usamos la versión 'headless' porque es la que exige vuestro </text:p>
      <text:p text:style-name="P2"># Dockerfile original para que sea 100% portable y no dé errores </text:p>
      <text:p text:style-name="P2"># de interfaz gráfica en el servidor.</text:p>
      <text:p text:style-name="P2">opencv-python-headless</text:p>
      <text:p text:style-name="P2"/>
      <text:p text:style-name="P2"># --- CORE DEL PROYECTO (CNN y Exportación) ---</text:p>
      <text:p text:style-name="P2">tensorflow</text:p>
      <text:p text:style-name="P2">tf2onnx</text:p>
      <text:p text:style-name="P2">scikit-learn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9:32:23.456663557</meta:creation-date>
    <dc:date>2026-03-30T20:47:02.763039028</dc:date>
    <meta:editing-duration>PT55M30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15" meta:word-count="68" meta:character-count="431" meta:non-whitespace-character-count="374"/>
  </office:meta>
</office:document-meta>
</file>